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9334" calcext:value-type="float">
            <text:p>1.159334</text:p>
          </table:table-cell>
          <table:table-cell office:value-type="float" office:value="1.141084" calcext:value-type="float">
            <text:p>1.141084</text:p>
          </table:table-cell>
          <table:table-cell office:value-type="float" office:value="1.486143" calcext:value-type="float">
            <text:p>1.486143</text:p>
          </table:table-cell>
          <table:table-cell office:value-type="float" office:value="10.11543" calcext:value-type="float">
            <text:p>10.11543</text:p>
          </table:table-cell>
          <table:table-cell office:value-type="float" office:value="1.980415" calcext:value-type="float">
            <text:p>1.980415</text:p>
          </table:table-cell>
          <table:table-cell office:value-type="float" office:value="-7.403669" calcext:value-type="float">
            <text:p>-7.403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658" calcext:value-type="float">
            <text:p>1.33658</text:p>
          </table:table-cell>
          <table:table-cell office:value-type="float" office:value="1.34959" calcext:value-type="float">
            <text:p>1.34959</text:p>
          </table:table-cell>
          <table:table-cell office:value-type="float" office:value="1.531409" calcext:value-type="float">
            <text:p>1.531409</text:p>
          </table:table-cell>
          <table:table-cell office:value-type="float" office:value="11.61798" calcext:value-type="float">
            <text:p>11.61798</text:p>
          </table:table-cell>
          <table:table-cell office:value-type="float" office:value="1.066895" calcext:value-type="float">
            <text:p>1.066895</text:p>
          </table:table-cell>
          <table:table-cell office:value-type="float" office:value="-5.340077" calcext:value-type="float">
            <text:p>-5.340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2236" calcext:value-type="float">
            <text:p>1.72236</text:p>
          </table:table-cell>
          <table:table-cell office:value-type="float" office:value="1.784101" calcext:value-type="float">
            <text:p>1.784101</text:p>
          </table:table-cell>
          <table:table-cell office:value-type="float" office:value="1.808088" calcext:value-type="float">
            <text:p>1.808088</text:p>
          </table:table-cell>
          <table:table-cell office:value-type="float" office:value="14.310829" calcext:value-type="float">
            <text:p>14.310829</text:p>
          </table:table-cell>
          <table:table-cell office:value-type="float" office:value="0.053753" calcext:value-type="float">
            <text:p>0.053753</text:p>
          </table:table-cell>
          <table:table-cell office:value-type="float" office:value="-3.711645" calcext:value-type="float">
            <text:p>-3.711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99777" calcext:value-type="float">
            <text:p>2.599777</text:p>
          </table:table-cell>
          <table:table-cell office:value-type="float" office:value="2.73984" calcext:value-type="float">
            <text:p>2.73984</text:p>
          </table:table-cell>
          <table:table-cell office:value-type="float" office:value="2.739654" calcext:value-type="float">
            <text:p>2.739654</text:p>
          </table:table-cell>
          <table:table-cell office:value-type="float" office:value="18.970327" calcext:value-type="float">
            <text:p>18.970327</text:p>
          </table:table-cell>
          <table:table-cell office:value-type="float" office:value="-0.802787" calcext:value-type="float">
            <text:p>-0.802787</text:p>
          </table:table-cell>
          <table:table-cell office:value-type="float" office:value="-3.993926" calcext:value-type="float">
            <text:p>-3.99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14579" calcext:value-type="float">
            <text:p>4.314579</text:p>
          </table:table-cell>
          <table:table-cell office:value-type="float" office:value="4.563726" calcext:value-type="float">
            <text:p>4.563726</text:p>
          </table:table-cell>
          <table:table-cell office:value-type="float" office:value="4.96561" calcext:value-type="float">
            <text:p>4.96561</text:p>
          </table:table-cell>
          <table:table-cell office:value-type="float" office:value="25.453816" calcext:value-type="float">
            <text:p>25.453816</text:p>
          </table:table-cell>
          <table:table-cell office:value-type="float" office:value="-1.168673" calcext:value-type="float">
            <text:p>-1.168673</text:p>
          </table:table-cell>
          <table:table-cell office:value-type="float" office:value="-6.910468" calcext:value-type="float">
            <text:p>-6.910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65644" calcext:value-type="float">
            <text:p>5.665644</text:p>
          </table:table-cell>
          <table:table-cell office:value-type="float" office:value="5.978209" calcext:value-type="float">
            <text:p>5.978209</text:p>
          </table:table-cell>
          <table:table-cell office:value-type="float" office:value="6.858013" calcext:value-type="float">
            <text:p>6.858013</text:p>
          </table:table-cell>
          <table:table-cell office:value-type="float" office:value="29.35742" calcext:value-type="float">
            <text:p>29.35742</text:p>
          </table:table-cell>
          <table:table-cell office:value-type="float" office:value="-1.120725" calcext:value-type="float">
            <text:p>-1.120725</text:p>
          </table:table-cell>
          <table:table-cell office:value-type="float" office:value="-9.086928" calcext:value-type="float">
            <text:p>-9.086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66747" calcext:value-type="float">
            <text:p>7.166747</text:p>
          </table:table-cell>
          <table:table-cell office:value-type="float" office:value="7.54887" calcext:value-type="float">
            <text:p>7.54887</text:p>
          </table:table-cell>
          <table:table-cell office:value-type="float" office:value="9.052284" calcext:value-type="float">
            <text:p>9.052284</text:p>
          </table:table-cell>
          <table:table-cell office:value-type="float" office:value="33.025117" calcext:value-type="float">
            <text:p>33.025117</text:p>
          </table:table-cell>
          <table:table-cell office:value-type="float" office:value="-1.088457" calcext:value-type="float">
            <text:p>-1.088457</text:p>
          </table:table-cell>
          <table:table-cell office:value-type="float" office:value="-11.225968" calcext:value-type="float">
            <text:p>-11.225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55524" calcext:value-type="float">
            <text:p>9.155524</text:p>
          </table:table-cell>
          <table:table-cell office:value-type="float" office:value="9.610062" calcext:value-type="float">
            <text:p>9.610062</text:p>
          </table:table-cell>
          <table:table-cell office:value-type="float" office:value="12.025075" calcext:value-type="float">
            <text:p>12.025075</text:p>
          </table:table-cell>
          <table:table-cell office:value-type="float" office:value="37.133291" calcext:value-type="float">
            <text:p>37.133291</text:p>
          </table:table-cell>
          <table:table-cell office:value-type="float" office:value="-0.914236" calcext:value-type="float">
            <text:p>-0.914236</text:p>
          </table:table-cell>
          <table:table-cell office:value-type="float" office:value="-13.649548" calcext:value-type="float">
            <text:p>-13.649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81566" calcext:value-type="float">
            <text:p>11.581566</text:p>
          </table:table-cell>
          <table:table-cell office:value-type="float" office:value="12.114527" calcext:value-type="float">
            <text:p>12.114527</text:p>
          </table:table-cell>
          <table:table-cell office:value-type="float" office:value="15.730847" calcext:value-type="float">
            <text:p>15.730847</text:p>
          </table:table-cell>
          <table:table-cell office:value-type="float" office:value="41.397566" calcext:value-type="float">
            <text:p>41.397566</text:p>
          </table:table-cell>
          <table:table-cell office:value-type="float" office:value="-0.703033" calcext:value-type="float">
            <text:p>-0.703033</text:p>
          </table:table-cell>
          <table:table-cell office:value-type="float" office:value="-16.157406" calcext:value-type="float">
            <text:p>-16.157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302957" calcext:value-type="float">
            <text:p>14.302957</text:p>
          </table:table-cell>
          <table:table-cell office:value-type="float" office:value="14.929161" calcext:value-type="float">
            <text:p>14.929161</text:p>
          </table:table-cell>
          <table:table-cell office:value-type="float" office:value="19.982757" calcext:value-type="float">
            <text:p>19.982757</text:p>
          </table:table-cell>
          <table:table-cell office:value-type="float" office:value="45.53702" calcext:value-type="float">
            <text:p>45.53702</text:p>
          </table:table-cell>
          <table:table-cell office:value-type="float" office:value="-0.564954" calcext:value-type="float">
            <text:p>-0.564954</text:p>
          </table:table-cell>
          <table:table-cell office:value-type="float" office:value="-18.57699" calcext:value-type="float">
            <text:p>-18.576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519112" calcext:value-type="float">
            <text:p>17.519112</text:p>
          </table:table-cell>
          <table:table-cell office:value-type="float" office:value="18.185748" calcext:value-type="float">
            <text:p>18.185748</text:p>
          </table:table-cell>
          <table:table-cell office:value-type="float" office:value="24.974757" calcext:value-type="float">
            <text:p>24.974757</text:p>
          </table:table-cell>
          <table:table-cell office:value-type="float" office:value="49.72063" calcext:value-type="float">
            <text:p>49.72063</text:p>
          </table:table-cell>
          <table:table-cell office:value-type="float" office:value="-0.084241" calcext:value-type="float">
            <text:p>-0.084241</text:p>
          </table:table-cell>
          <table:table-cell office:value-type="float" office:value="-20.984352" calcext:value-type="float">
            <text:p>-20.984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739321" calcext:value-type="float">
            <text:p>20.739321</text:p>
          </table:table-cell>
          <table:table-cell office:value-type="float" office:value="21.474832" calcext:value-type="float">
            <text:p>21.474832</text:p>
          </table:table-cell>
          <table:table-cell office:value-type="float" office:value="30.094216" calcext:value-type="float">
            <text:p>30.094216</text:p>
          </table:table-cell>
          <table:table-cell office:value-type="float" office:value="53.465299" calcext:value-type="float">
            <text:p>53.465299</text:p>
          </table:table-cell>
          <table:table-cell office:value-type="float" office:value="0.160073" calcext:value-type="float">
            <text:p>0.160073</text:p>
          </table:table-cell>
          <table:table-cell office:value-type="float" office:value="-23.140161" calcext:value-type="float">
            <text:p>-23.140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590202" calcext:value-type="float">
            <text:p>24.590202</text:p>
          </table:table-cell>
          <table:table-cell office:value-type="float" office:value="25.383873" calcext:value-type="float">
            <text:p>25.383873</text:p>
          </table:table-cell>
          <table:table-cell office:value-type="float" office:value="36.142228" calcext:value-type="float">
            <text:p>36.142228</text:p>
          </table:table-cell>
          <table:table-cell office:value-type="float" office:value="57.447545" calcext:value-type="float">
            <text:p>57.447545</text:p>
          </table:table-cell>
          <table:table-cell office:value-type="float" office:value="0.495057" calcext:value-type="float">
            <text:p>0.495057</text:p>
          </table:table-cell>
          <table:table-cell office:value-type="float" office:value="-25.269501" calcext:value-type="float">
            <text:p>-25.269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49044" calcext:value-type="float">
            <text:p>28.49044</text:p>
          </table:table-cell>
          <table:table-cell office:value-type="float" office:value="29.425166" calcext:value-type="float">
            <text:p>29.425166</text:p>
          </table:table-cell>
          <table:table-cell office:value-type="float" office:value="42.490009" calcext:value-type="float">
            <text:p>42.490009</text:p>
          </table:table-cell>
          <table:table-cell office:value-type="float" office:value="61.15504" calcext:value-type="float">
            <text:p>61.15504</text:p>
          </table:table-cell>
          <table:table-cell office:value-type="float" office:value="0.462791" calcext:value-type="float">
            <text:p>0.462791</text:p>
          </table:table-cell>
          <table:table-cell office:value-type="float" office:value="-27.295246" calcext:value-type="float">
            <text:p>-27.295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051771" calcext:value-type="float">
            <text:p>33.051771</text:p>
          </table:table-cell>
          <table:table-cell office:value-type="float" office:value="34.047248" calcext:value-type="float">
            <text:p>34.047248</text:p>
          </table:table-cell>
          <table:table-cell office:value-type="float" office:value="49.66084" calcext:value-type="float">
            <text:p>49.66084</text:p>
          </table:table-cell>
          <table:table-cell office:value-type="float" office:value="65.000058" calcext:value-type="float">
            <text:p>65.000058</text:p>
          </table:table-cell>
          <table:table-cell office:value-type="float" office:value="0.789885" calcext:value-type="float">
            <text:p>0.789885</text:p>
          </table:table-cell>
          <table:table-cell office:value-type="float" office:value="-29.220223" calcext:value-type="float">
            <text:p>-29.220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936739" calcext:value-type="float">
            <text:p>37.936739</text:p>
          </table:table-cell>
          <table:table-cell office:value-type="float" office:value="38.987552" calcext:value-type="float">
            <text:p>38.987552</text:p>
          </table:table-cell>
          <table:table-cell office:value-type="float" office:value="57.382978" calcext:value-type="float">
            <text:p>57.382978</text:p>
          </table:table-cell>
          <table:table-cell office:value-type="float" office:value="68.742247" calcext:value-type="float">
            <text:p>68.742247</text:p>
          </table:table-cell>
          <table:table-cell office:value-type="float" office:value="1.113467" calcext:value-type="float">
            <text:p>1.113467</text:p>
          </table:table-cell>
          <table:table-cell office:value-type="float" office:value="-31.103255" calcext:value-type="float">
            <text:p>-31.103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1752" calcext:value-type="float">
            <text:p>43.1752</text:p>
          </table:table-cell>
          <table:table-cell office:value-type="float" office:value="44.31614" calcext:value-type="float">
            <text:p>44.31614</text:p>
          </table:table-cell>
          <table:table-cell office:value-type="float" office:value="65.657391" calcext:value-type="float">
            <text:p>65.657391</text:p>
          </table:table-cell>
          <table:table-cell office:value-type="float" office:value="72.4393" calcext:value-type="float">
            <text:p>72.4393</text:p>
          </table:table-cell>
          <table:table-cell office:value-type="float" office:value="1.320084" calcext:value-type="float">
            <text:p>1.320084</text:p>
          </table:table-cell>
          <table:table-cell office:value-type="float" office:value="-32.867265" calcext:value-type="float">
            <text:p>-32.8672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904702" calcext:value-type="float">
            <text:p>48.904702</text:p>
          </table:table-cell>
          <table:table-cell office:value-type="float" office:value="50.176844" calcext:value-type="float">
            <text:p>50.176844</text:p>
          </table:table-cell>
          <table:table-cell office:value-type="float" office:value="74.851626" calcext:value-type="float">
            <text:p>74.851626</text:p>
          </table:table-cell>
          <table:table-cell office:value-type="float" office:value="76.177679" calcext:value-type="float">
            <text:p>76.177679</text:p>
          </table:table-cell>
          <table:table-cell office:value-type="float" office:value="1.429392" calcext:value-type="float">
            <text:p>1.429392</text:p>
          </table:table-cell>
          <table:table-cell office:value-type="float" office:value="-34.698381" calcext:value-type="float">
            <text:p>-34.6983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.318845" calcext:value-type="float">
            <text:p>55.318845</text:p>
          </table:table-cell>
          <table:table-cell office:value-type="float" office:value="56.594983" calcext:value-type="float">
            <text:p>56.594983</text:p>
          </table:table-cell>
          <table:table-cell office:value-type="float" office:value="84.778961" calcext:value-type="float">
            <text:p>84.778961</text:p>
          </table:table-cell>
          <table:table-cell office:value-type="float" office:value="79.951249" calcext:value-type="float">
            <text:p>79.951249</text:p>
          </table:table-cell>
          <table:table-cell office:value-type="float" office:value="1.885652" calcext:value-type="float">
            <text:p>1.885652</text:p>
          </table:table-cell>
          <table:table-cell office:value-type="float" office:value="-36.399409" calcext:value-type="float">
            <text:p>-36.3994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.774018" calcext:value-type="float">
            <text:p>61.774018</text:p>
          </table:table-cell>
          <table:table-cell office:value-type="float" office:value="63.192754" calcext:value-type="float">
            <text:p>63.192754</text:p>
          </table:table-cell>
          <table:table-cell office:value-type="float" office:value="94.892989" calcext:value-type="float">
            <text:p>94.892989</text:p>
          </table:table-cell>
          <table:table-cell office:value-type="float" office:value="83.543693" calcext:value-type="float">
            <text:p>83.543693</text:p>
          </table:table-cell>
          <table:table-cell office:value-type="float" office:value="1.970609" calcext:value-type="float">
            <text:p>1.970609</text:p>
          </table:table-cell>
          <table:table-cell office:value-type="float" office:value="-37.932106" calcext:value-type="float">
            <text:p>-37.93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560339" calcext:value-type="float">
            <text:p>68.560339</text:p>
          </table:table-cell>
          <table:table-cell office:value-type="float" office:value="69.959674" calcext:value-type="float">
            <text:p>69.959674</text:p>
          </table:table-cell>
          <table:table-cell office:value-type="float" office:value="105.18784" calcext:value-type="float">
            <text:p>105.18784</text:p>
          </table:table-cell>
          <table:table-cell office:value-type="float" office:value="86.977082" calcext:value-type="float">
            <text:p>86.977082</text:p>
          </table:table-cell>
          <table:table-cell office:value-type="float" office:value="2.410618" calcext:value-type="float">
            <text:p>2.410618</text:p>
          </table:table-cell>
          <table:table-cell office:value-type="float" office:value="-39.332119" calcext:value-type="float">
            <text:p>-39.332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.927271" calcext:value-type="float">
            <text:p>75.927271</text:p>
          </table:table-cell>
          <table:table-cell office:value-type="float" office:value="77.468902" calcext:value-type="float">
            <text:p>77.468902</text:p>
          </table:table-cell>
          <table:table-cell office:value-type="float" office:value="116.405419" calcext:value-type="float">
            <text:p>116.405419</text:p>
          </table:table-cell>
          <table:table-cell office:value-type="float" office:value="90.536998" calcext:value-type="float">
            <text:p>90.536998</text:p>
          </table:table-cell>
          <table:table-cell office:value-type="float" office:value="2.509976" calcext:value-type="float">
            <text:p>2.509976</text:p>
          </table:table-cell>
          <table:table-cell office:value-type="float" office:value="-40.644999" calcext:value-type="float">
            <text:p>-40.644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.068416" calcext:value-type="float">
            <text:p>84.068416</text:p>
          </table:table-cell>
          <table:table-cell office:value-type="float" office:value="85.745758" calcext:value-type="float">
            <text:p>85.745758</text:p>
          </table:table-cell>
          <table:table-cell office:value-type="float" office:value="128.359001" calcext:value-type="float">
            <text:p>128.359001</text:p>
          </table:table-cell>
          <table:table-cell office:value-type="float" office:value="94.203538" calcext:value-type="float">
            <text:p>94.203538</text:p>
          </table:table-cell>
          <table:table-cell office:value-type="float" office:value="2.651287" calcext:value-type="float">
            <text:p>2.651287</text:p>
          </table:table-cell>
          <table:table-cell office:value-type="float" office:value="-41.753317" calcext:value-type="float">
            <text:p>-41.7533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.042156" calcext:value-type="float">
            <text:p>92.042156</text:p>
          </table:table-cell>
          <table:table-cell office:value-type="float" office:value="93.808719" calcext:value-type="float">
            <text:p>93.808719</text:p>
          </table:table-cell>
          <table:table-cell office:value-type="float" office:value="139.944066" calcext:value-type="float">
            <text:p>139.944066</text:p>
          </table:table-cell>
          <table:table-cell office:value-type="float" office:value="97.554859" calcext:value-type="float">
            <text:p>97.554859</text:p>
          </table:table-cell>
          <table:table-cell office:value-type="float" office:value="2.854084" calcext:value-type="float">
            <text:p>2.854084</text:p>
          </table:table-cell>
          <table:table-cell office:value-type="float" office:value="-42.747829" calcext:value-type="float">
            <text:p>-42.7478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.143602" calcext:value-type="float">
            <text:p>101.143602</text:p>
          </table:table-cell>
          <table:table-cell office:value-type="float" office:value="103.027592" calcext:value-type="float">
            <text:p>103.027592</text:p>
          </table:table-cell>
          <table:table-cell office:value-type="float" office:value="152.817408" calcext:value-type="float">
            <text:p>152.817408</text:p>
          </table:table-cell>
          <table:table-cell office:value-type="float" office:value="101.159049" calcext:value-type="float">
            <text:p>101.159049</text:p>
          </table:table-cell>
          <table:table-cell office:value-type="float" office:value="3.038748" calcext:value-type="float">
            <text:p>3.038748</text:p>
          </table:table-cell>
          <table:table-cell office:value-type="float" office:value="-43.634363" calcext:value-type="float">
            <text:p>-43.6343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.832404" calcext:value-type="float">
            <text:p>109.832404</text:p>
          </table:table-cell>
          <table:table-cell office:value-type="float" office:value="111.814974" calcext:value-type="float">
            <text:p>111.814974</text:p>
          </table:table-cell>
          <table:table-cell office:value-type="float" office:value="164.588106" calcext:value-type="float">
            <text:p>164.588106</text:p>
          </table:table-cell>
          <table:table-cell office:value-type="float" office:value="104.399489" calcext:value-type="float">
            <text:p>104.399489</text:p>
          </table:table-cell>
          <table:table-cell office:value-type="float" office:value="3.221244" calcext:value-type="float">
            <text:p>3.221244</text:p>
          </table:table-cell>
          <table:table-cell office:value-type="float" office:value="-44.198655" calcext:value-type="float">
            <text:p>-44.1986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.784911" calcext:value-type="float">
            <text:p>119.784911</text:p>
          </table:table-cell>
          <table:table-cell office:value-type="float" office:value="121.82124" calcext:value-type="float">
            <text:p>121.82124</text:p>
          </table:table-cell>
          <table:table-cell office:value-type="float" office:value="177.462309" calcext:value-type="float">
            <text:p>177.462309</text:p>
          </table:table-cell>
          <table:table-cell office:value-type="float" office:value="107.88888" calcext:value-type="float">
            <text:p>107.88888</text:p>
          </table:table-cell>
          <table:table-cell office:value-type="float" office:value="3.499629" calcext:value-type="float">
            <text:p>3.499629</text:p>
          </table:table-cell>
          <table:table-cell office:value-type="float" office:value="-44.583274" calcext:value-type="float">
            <text:p>-44.583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9.797697" calcext:value-type="float">
            <text:p>129.797697</text:p>
          </table:table-cell>
          <table:table-cell office:value-type="float" office:value="132.064557" calcext:value-type="float">
            <text:p>132.064557</text:p>
          </table:table-cell>
          <table:table-cell office:value-type="float" office:value="189.790013" calcext:value-type="float">
            <text:p>189.790013</text:p>
          </table:table-cell>
          <table:table-cell office:value-type="float" office:value="111.268253" calcext:value-type="float">
            <text:p>111.268253</text:p>
          </table:table-cell>
          <table:table-cell office:value-type="float" office:value="3.511017" calcext:value-type="float">
            <text:p>3.511017</text:p>
          </table:table-cell>
          <table:table-cell office:value-type="float" office:value="-44.60185" calcext:value-type="float">
            <text:p>-44.60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.631688" calcext:value-type="float">
            <text:p>140.631688</text:p>
          </table:table-cell>
          <table:table-cell office:value-type="float" office:value="143.025203" calcext:value-type="float">
            <text:p>143.025203</text:p>
          </table:table-cell>
          <table:table-cell office:value-type="float" office:value="202.117609" calcext:value-type="float">
            <text:p>202.117609</text:p>
          </table:table-cell>
          <table:table-cell office:value-type="float" office:value="114.695965" calcext:value-type="float">
            <text:p>114.695965</text:p>
          </table:table-cell>
          <table:table-cell office:value-type="float" office:value="3.688224" calcext:value-type="float">
            <text:p>3.688224</text:p>
          </table:table-cell>
          <table:table-cell office:value-type="float" office:value="-44.289099" calcext:value-type="float">
            <text:p>-44.2890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.013901" calcext:value-type="float">
            <text:p>152.013901</text:p>
          </table:table-cell>
          <table:table-cell office:value-type="float" office:value="154.593298" calcext:value-type="float">
            <text:p>154.593298</text:p>
          </table:table-cell>
          <table:table-cell office:value-type="float" office:value="213.713888" calcext:value-type="float">
            <text:p>213.713888</text:p>
          </table:table-cell>
          <table:table-cell office:value-type="float" office:value="118.128647" calcext:value-type="float">
            <text:p>118.128647</text:p>
          </table:table-cell>
          <table:table-cell office:value-type="float" office:value="3.794931" calcext:value-type="float">
            <text:p>3.794931</text:p>
          </table:table-cell>
          <table:table-cell office:value-type="float" office:value="-43.431612" calcext:value-type="float">
            <text:p>-43.431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.864954" calcext:value-type="float">
            <text:p>163.864954</text:p>
          </table:table-cell>
          <table:table-cell office:value-type="float" office:value="166.684282" calcext:value-type="float">
            <text:p>166.684282</text:p>
          </table:table-cell>
          <table:table-cell office:value-type="float" office:value="223.660915" calcext:value-type="float">
            <text:p>223.660915</text:p>
          </table:table-cell>
          <table:table-cell office:value-type="float" office:value="121.538053" calcext:value-type="float">
            <text:p>121.538053</text:p>
          </table:table-cell>
          <table:table-cell office:value-type="float" office:value="3.845042" calcext:value-type="float">
            <text:p>3.845042</text:p>
          </table:table-cell>
          <table:table-cell office:value-type="float" office:value="-41.750527" calcext:value-type="float">
            <text:p>-41.7505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.005286" calcext:value-type="float">
            <text:p>176.005286</text:p>
          </table:table-cell>
          <table:table-cell office:value-type="float" office:value="178.990755" calcext:value-type="float">
            <text:p>178.990755</text:p>
          </table:table-cell>
          <table:table-cell office:value-type="float" office:value="230.303695" calcext:value-type="float">
            <text:p>230.303695</text:p>
          </table:table-cell>
          <table:table-cell office:value-type="float" office:value="124.842867" calcext:value-type="float">
            <text:p>124.842867</text:p>
          </table:table-cell>
          <table:table-cell office:value-type="float" office:value="3.986057" calcext:value-type="float">
            <text:p>3.986057</text:p>
          </table:table-cell>
          <table:table-cell office:value-type="float" office:value="-38.786664" calcext:value-type="float">
            <text:p>-38.7866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77.380908" calcext:value-type="float">
            <text:p>177.380908</text:p>
          </table:table-cell>
          <table:table-cell office:value-type="float" office:value="180.638967" calcext:value-type="float">
            <text:p>180.638967</text:p>
          </table:table-cell>
          <table:table-cell office:value-type="float" office:value="231.781554" calcext:value-type="float">
            <text:p>231.781554</text:p>
          </table:table-cell>
          <table:table-cell office:value-type="float" office:value="125.273857" calcext:value-type="float">
            <text:p>125.273857</text:p>
          </table:table-cell>
          <table:table-cell office:value-type="float" office:value="3.716202" calcext:value-type="float">
            <text:p>3.716202</text:p>
          </table:table-cell>
          <table:table-cell office:value-type="float" office:value="-38.644677" calcext:value-type="float">
            <text:p>-38.644677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.16175" calcext:value-type="float">
            <text:p>1.16175</text:p>
          </table:table-cell>
          <table:table-cell office:value-type="float" office:value="1.133887" calcext:value-type="float">
            <text:p>1.133887</text:p>
          </table:table-cell>
          <table:table-cell office:value-type="float" office:value="1.552199" calcext:value-type="float">
            <text:p>1.552199</text:p>
          </table:table-cell>
          <table:table-cell office:value-type="float" office:value="10.06041" calcext:value-type="float">
            <text:p>10.06041</text:p>
          </table:table-cell>
          <table:table-cell office:value-type="float" office:value="2.297073" calcext:value-type="float">
            <text:p>2.297073</text:p>
          </table:table-cell>
          <table:table-cell office:value-type="float" office:value="-8.264107" calcext:value-type="float">
            <text:p>-8.264107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70.002201" calcext:value-type="float">
            <text:p>70.002201</text:p>
          </table:table-cell>
          <table:table-cell office:value-type="float" office:value="45.464071" calcext:value-type="float">
            <text:p>45.464071</text:p>
          </table:table-cell>
          <table:table-cell office:value-type="float" office:value="30.347893" calcext:value-type="float">
            <text:p>30.347893</text:p>
          </table:table-cell>
          <table:table-cell office:value-type="float" office:value="73.196421" calcext:value-type="float">
            <text:p>73.196421</text:p>
          </table:table-cell>
          <table:table-cell office:value-type="float" office:value="64.916829" calcext:value-type="float">
            <text:p>64.916829</text:p>
          </table:table-cell>
          <table:table-cell office:value-type="float" office:value="10.478594" calcext:value-type="float">
            <text:p>10.47859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3.690426" calcext:value-type="float">
            <text:p>73.690426</text:p>
          </table:table-cell>
          <table:table-cell office:value-type="float" office:value="102.873333" calcext:value-type="float">
            <text:p>102.873333</text:p>
          </table:table-cell>
          <table:table-cell office:value-type="float" office:value="40.665275" calcext:value-type="float">
            <text:p>40.665275</text:p>
          </table:table-cell>
          <table:table-cell office:value-type="float" office:value="101.100547" calcext:value-type="float">
            <text:p>101.100547</text:p>
          </table:table-cell>
          <table:table-cell office:value-type="float" office:value="-47.601991" calcext:value-type="float">
            <text:p>-47.601991</text:p>
          </table:table-cell>
          <table:table-cell office:value-type="float" office:value="43.904979" calcext:value-type="float">
            <text:p>43.904979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6.96156" calcext:value-type="float">
            <text:p>36.96156</text:p>
          </table:table-cell>
          <table:table-cell office:value-type="float" office:value="35.262614" calcext:value-type="float">
            <text:p>35.262614</text:p>
          </table:table-cell>
          <table:table-cell office:value-type="float" office:value="164.129164" calcext:value-type="float">
            <text:p>164.129164</text:p>
          </table:table-cell>
          <table:table-cell office:value-type="float" office:value="65.952617" calcext:value-type="float">
            <text:p>65.952617</text:p>
          </table:table-cell>
          <table:table-cell office:value-type="float" office:value="9.971119" calcext:value-type="float">
            <text:p>9.971119</text:p>
          </table:table-cell>
          <table:table-cell office:value-type="float" office:value="-110.252122" calcext:value-type="float">
            <text:p>-110.252122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.098979" calcext:value-type="float">
            <text:p>142.098979</text:p>
          </table:table-cell>
          <table:table-cell office:value-type="float" office:value="146.522095" calcext:value-type="float">
            <text:p>146.522095</text:p>
          </table:table-cell>
          <table:table-cell office:value-type="float" office:value="69.480282" calcext:value-type="float">
            <text:p>69.480282</text:p>
          </table:table-cell>
          <table:table-cell office:value-type="float" office:value="115.75255" calcext:value-type="float">
            <text:p>115.75255</text:p>
          </table:table-cell>
          <table:table-cell office:value-type="float" office:value="1.099221" calcext:value-type="float">
            <text:p>1.099221</text:p>
          </table:table-cell>
          <table:table-cell office:value-type="float" office:value="38.281092" calcext:value-type="float">
            <text:p>38.281092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109.554702" calcext:value-type="float">
            <text:p>109.554702</text:p>
          </table:table-cell>
          <table:table-cell office:value-type="float" office:value="137.147021" calcext:value-type="float">
            <text:p>137.147021</text:p>
          </table:table-cell>
          <table:table-cell office:value-type="float" office:value="202.958695" calcext:value-type="float">
            <text:p>202.958695</text:p>
          </table:table-cell>
          <table:table-cell office:value-type="float" office:value="112.880372" calcext:value-type="float">
            <text:p>112.880372</text:p>
          </table:table-cell>
          <table:table-cell office:value-type="float" office:value="-33.774758" calcext:value-type="float">
            <text:p>-33.774758</text:p>
          </table:table-cell>
          <table:table-cell office:value-type="float" office:value="-47.79292" calcext:value-type="float">
            <text:p>-47.79292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float" office:value="104.87945" calcext:value-type="float">
            <text:p>104.87945</text:p>
          </table:table-cell>
          <table:table-cell office:value-type="float" office:value="79.142534" calcext:value-type="float">
            <text:p>79.142534</text:p>
          </table:table-cell>
          <table:table-cell office:value-type="float" office:value="192.958814" calcext:value-type="float">
            <text:p>192.958814</text:p>
          </table:table-cell>
          <table:table-cell office:value-type="float" office:value="91.298744" calcext:value-type="float">
            <text:p>91.298744</text:p>
          </table:table-cell>
          <table:table-cell office:value-type="float" office:value="51.719532" calcext:value-type="float">
            <text:p>51.719532</text:p>
          </table:table-cell>
          <table:table-cell office:value-type="float" office:value="-80.49338" calcext:value-type="float">
            <text:p>-80.49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13:33:17.155035836</meta:creation-date>
    <dc:date>2026-05-12T13:34:15.645061417</dc:date>
    <meta:editing-duration>PT58S</meta:editing-duration>
    <meta:editing-cycles>1</meta:editing-cycles>
    <meta:document-statistic meta:table-count="1" meta:cell-count="287" meta:object-count="0"/>
    <meta:generator>LibreOffice/25.8.6.2$Linux_X86_64 LibreOffice_project/9ad09ed4e41fba5287dcc205220c6d606e1ac75e</meta:generator>
  </office:meta>
</office:document-meta>
</file>